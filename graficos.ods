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4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4673in" svg:height="5.3539in" svg:x="7.05in" svg:y="2.0287in">
            <draw:object draw:notify-on-update-of-ranges="Sheet1.A4:Sheet1.A9 Sheet1.I3:Sheet1.I3 Sheet1.I4:Sheet1.I9 Sheet1.U3:Sheet1.U3 Sheet1.U4:Sheet1.U9 Sheet1.G3:Sheet1.G3 Sheet1.G4:Sheet1.G9 Sheet1.S3:Sheet1.S3 Sheet1.S4:Sheet1.S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PI PURO – ESCALABILIDADE FORTE</text:p>
          </table:table-cell>
          <table:table-cell table:number-columns-repeated="9"/>
          <table:table-cell table:style-name="ce1" office:value-type="string" calcext:value-type="string">
            <text:p>MPI PURO – ESCALABILIDADE FRACA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number-columns-repeated="15"/>
          <table:table-cell table:style-name="ce3"/>
          <table:table-cell table:number-columns-repeated="5"/>
        </table:table-row>
        <table:table-row table:style-name="ro1">
          <table:table-cell table:style-name="ce2" office:value-type="string" calcext:value-type="string">
            <text:p>Processos</text:p>
          </table:table-cell>
          <table:table-cell table:style-name="ce2"/>
          <table:table-cell table:style-name="ce2" office:value-type="string" calcext:value-type="string">
            <text:p>Carga</text:p>
          </table:table-cell>
          <table:table-cell table:style-name="ce2"/>
          <table:table-cell table:style-name="ce2" office:value-type="string" calcext:value-type="string">
            <text:p>Tempo de execução (s)</text:p>
          </table:table-cell>
          <table:table-cell/>
          <table:table-cell table:style-name="ce2" office:value-type="string" calcext:value-type="string">
            <text:p>Speed-up (Forte)</text:p>
          </table:table-cell>
          <table:table-cell table:style-name="ce2"/>
          <table:table-cell table:style-name="ce2" office:value-type="string" calcext:value-type="string">
            <text:p>Eficiência (Forte)</text:p>
          </table:table-cell>
          <table:table-cell/>
          <table:table-cell table:style-name="ce2" office:value-type="string" calcext:value-type="string">
            <text:p>Processos</text:p>
          </table:table-cell>
          <table:table-cell table:style-name="ce2"/>
          <table:table-cell table:style-name="ce2" office:value-type="string" calcext:value-type="string">
            <text:p>Carga</text:p>
          </table:table-cell>
          <table:table-cell table:style-name="ce2"/>
          <table:table-cell table:style-name="ce2" office:value-type="string" calcext:value-type="string">
            <text:p>Tempo de execução (s)</text:p>
          </table:table-cell>
          <table:table-cell table:style-name="ce3"/>
          <table:table-cell table:style-name="ce2" office:value-type="string" calcext:value-type="string">
            <text:p>Tempo sequencial (s)</text:p>
          </table:table-cell>
          <table:table-cell/>
          <table:table-cell table:style-name="ce2" office:value-type="string" calcext:value-type="string">
            <text:p>Speed-up (Fraca)</text:p>
          </table:table-cell>
          <table:table-cell table:style-name="ce2"/>
          <table:table-cell table:style-name="ce2" office:value-type="string" calcext:value-type="string">
            <text:p>Eficiência (Fraca)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2" office:value-type="float" office:value="76.716772" calcext:value-type="float">
            <text:p>76.716772</text:p>
          </table:table-cell>
          <table:table-cell/>
          <table:table-cell table:style-name="ce2" table:formula="of:=[.E4]/[.E4]" office:value-type="float" office:value="1" calcext:value-type="float">
            <text:p>1</text:p>
          </table:table-cell>
          <table:table-cell table:style-name="ce2"/>
          <table:table-cell table:style-name="ce2" table:formula="of:=[.G4]/[.A4]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2" office:value-type="float" office:value="76.716772" calcext:value-type="float">
            <text:p>76.716772</text:p>
          </table:table-cell>
          <table:table-cell table:style-name="ce3"/>
          <table:table-cell table:style-name="ce2" office:value-type="float" office:value="76.716772" calcext:value-type="float">
            <text:p>76.716772</text:p>
          </table:table-cell>
          <table:table-cell/>
          <table:table-cell table:style-name="ce2" table:formula="of:=[.Q4]/[.O4]" office:value-type="float" office:value="1" calcext:value-type="float">
            <text:p>1</text:p>
          </table:table-cell>
          <table:table-cell table:style-name="ce2"/>
          <table:table-cell table:style-name="ce2" table:formula="of:=[.S4]/[.K4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2" office:value-type="float" office:value="25.788336" calcext:value-type="float">
            <text:p>25.788336</text:p>
          </table:table-cell>
          <table:table-cell/>
          <table:table-cell table:style-name="ce2" table:formula="of:=[.E4]/[.E5]" office:value-type="float" office:value="2.97486320947579" calcext:value-type="float">
            <text:p>2.97486320947579</text:p>
          </table:table-cell>
          <table:table-cell table:style-name="ce2"/>
          <table:table-cell table:style-name="ce2" table:formula="of:=[.G5]/[.A5]" office:value-type="float" office:value="0.743715802368947" calcext:value-type="float">
            <text:p>0.74371580236894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4000" calcext:value-type="float">
            <text:p>4000</text:p>
          </table:table-cell>
          <table:table-cell table:style-name="ce2"/>
          <table:table-cell table:style-name="ce2" office:value-type="float" office:value="99.793408" calcext:value-type="float">
            <text:p>99.793408</text:p>
          </table:table-cell>
          <table:table-cell table:style-name="ce3"/>
          <table:table-cell table:style-name="ce2" office:value-type="float" office:value="306.867088" calcext:value-type="float">
            <text:p>306.867088</text:p>
          </table:table-cell>
          <table:table-cell/>
          <table:table-cell table:style-name="ce2" table:formula="of:=[.Q5]/[.O5]" office:value-type="float" office:value="3.07502363282352" calcext:value-type="float">
            <text:p>3.07502363282352</text:p>
          </table:table-cell>
          <table:table-cell table:style-name="ce2"/>
          <table:table-cell table:style-name="ce2" table:formula="of:=[.S5]/[.K5]" office:value-type="float" office:value="0.768755908205881" calcext:value-type="float">
            <text:p>0.76875590820588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2" office:value-type="float" office:value="11.091363" calcext:value-type="float">
            <text:p>11.091363</text:p>
          </table:table-cell>
          <table:table-cell/>
          <table:table-cell table:style-name="ce2" table:formula="of:=[.E4]/[.E6]" office:value-type="float" office:value="6.91680292133618" calcext:value-type="float">
            <text:p>6.91680292133618</text:p>
          </table:table-cell>
          <table:table-cell table:style-name="ce2"/>
          <table:table-cell table:style-name="ce2" table:formula="of:=[.G6]/[.A6]" office:value-type="float" office:value="0.864600365167022" calcext:value-type="float">
            <text:p>0.864600365167022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000" calcext:value-type="float">
            <text:p>8000</text:p>
          </table:table-cell>
          <table:table-cell table:style-name="ce2"/>
          <table:table-cell table:style-name="ce2" office:value-type="float" office:value="84.92382" calcext:value-type="float">
            <text:p>84.92382</text:p>
          </table:table-cell>
          <table:table-cell table:style-name="ce3"/>
          <table:table-cell table:style-name="ce2" office:value-type="float" office:value="613.734176" calcext:value-type="float">
            <text:p>613.734176</text:p>
          </table:table-cell>
          <table:table-cell/>
          <table:table-cell table:style-name="ce2" table:formula="of:=[.Q6]/[.O6]" office:value-type="float" office:value="7.22687905466334" calcext:value-type="float">
            <text:p>7.22687905466334</text:p>
          </table:table-cell>
          <table:table-cell table:style-name="ce2"/>
          <table:table-cell table:style-name="ce2" table:formula="of:=[.S6]/[.K6]" office:value-type="float" office:value="0.903359881832918" calcext:value-type="float">
            <text:p>0.903359881832918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2" office:value-type="float" office:value="5.350919" calcext:value-type="float">
            <text:p>5.350919</text:p>
          </table:table-cell>
          <table:table-cell/>
          <table:table-cell table:style-name="ce2" table:formula="of:=[.E4]/[.E7]" office:value-type="float" office:value="14.3371207824301" calcext:value-type="float">
            <text:p>14.3371207824301</text:p>
          </table:table-cell>
          <table:table-cell table:style-name="ce2"/>
          <table:table-cell table:style-name="ce2" table:formula="of:=[.G7]/[.A7]" office:value-type="float" office:value="0.89607004890188" calcext:value-type="float">
            <text:p>0.89607004890188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16000" calcext:value-type="float">
            <text:p>16000</text:p>
          </table:table-cell>
          <table:table-cell table:style-name="ce2"/>
          <table:table-cell table:style-name="ce2" office:value-type="float" office:value="79.424975" calcext:value-type="float">
            <text:p>79.424975</text:p>
          </table:table-cell>
          <table:table-cell table:style-name="ce3"/>
          <table:table-cell table:style-name="ce2" office:value-type="float" office:value="1227.468352" calcext:value-type="float">
            <text:p>1227.468352</text:p>
          </table:table-cell>
          <table:table-cell/>
          <table:table-cell table:style-name="ce2" table:formula="of:=[.Q7]/[.O7]" office:value-type="float" office:value="15.454438002656" calcext:value-type="float">
            <text:p>15.454438002656</text:p>
          </table:table-cell>
          <table:table-cell table:style-name="ce2"/>
          <table:table-cell table:style-name="ce2" table:formula="of:=[.S7]/[.K7]" office:value-type="float" office:value="0.965902375165998" calcext:value-type="float">
            <text:p>0.96590237516599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2" office:value-type="float" office:value="2.732991" calcext:value-type="float">
            <text:p>2.732991</text:p>
          </table:table-cell>
          <table:table-cell/>
          <table:table-cell table:style-name="ce2" table:formula="of:=[.E4]/[.E8]" office:value-type="float" office:value="28.0706273822343" calcext:value-type="float">
            <text:p>28.0706273822343</text:p>
          </table:table-cell>
          <table:table-cell table:style-name="ce2"/>
          <table:table-cell table:style-name="ce2" table:formula="of:=[.G8]/[.A8]" office:value-type="float" office:value="0.877207105694823" calcext:value-type="float">
            <text:p>0.877207105694823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32000" calcext:value-type="float">
            <text:p>32000</text:p>
          </table:table-cell>
          <table:table-cell table:style-name="ce2"/>
          <table:table-cell table:style-name="ce2" office:value-type="float" office:value="80.89141" calcext:value-type="float">
            <text:p>80.89141</text:p>
          </table:table-cell>
          <table:table-cell table:style-name="ce3"/>
          <table:table-cell table:style-name="ce2" office:value-type="float" office:value="2454.936704" calcext:value-type="float">
            <text:p>2454.936704</text:p>
          </table:table-cell>
          <table:table-cell/>
          <table:table-cell table:style-name="ce2" table:formula="of:=[.Q8]/[.O8]" office:value-type="float" office:value="30.3485463289613" calcext:value-type="float">
            <text:p>30.3485463289613</text:p>
          </table:table-cell>
          <table:table-cell table:style-name="ce2"/>
          <table:table-cell table:style-name="ce2" table:formula="of:=[.S8]/[.K8]" office:value-type="float" office:value="0.94839207278004" calcext:value-type="float">
            <text:p>0.94839207278004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2" office:value-type="float" office:value="1.739022" calcext:value-type="float">
            <text:p>1.739022</text:p>
          </table:table-cell>
          <table:table-cell/>
          <table:table-cell table:style-name="ce2" table:formula="of:=[.E4]/[.E9]" office:value-type="float" office:value="44.1148944636698" calcext:value-type="float">
            <text:p>44.1148944636698</text:p>
          </table:table-cell>
          <table:table-cell table:style-name="ce2"/>
          <table:table-cell table:style-name="ce2" table:formula="of:=[.G9]/[.A9]" office:value-type="float" office:value="0.689295225994841" calcext:value-type="float">
            <text:p>0.689295225994841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64000" calcext:value-type="float">
            <text:p>64000</text:p>
          </table:table-cell>
          <table:table-cell table:style-name="ce2"/>
          <table:table-cell table:style-name="ce2" office:value-type="float" office:value="101.279405" calcext:value-type="float">
            <text:p>101.279405</text:p>
          </table:table-cell>
          <table:table-cell table:style-name="ce3"/>
          <table:table-cell table:style-name="ce2" office:value-type="float" office:value="4909.873408" calcext:value-type="float">
            <text:p>4909.873408</text:p>
          </table:table-cell>
          <table:table-cell/>
          <table:table-cell table:style-name="ce2" table:formula="of:=[.Q9]/[.O9]" office:value-type="float" office:value="48.4784977557876" calcext:value-type="float">
            <text:p>48.4784977557876</text:p>
          </table:table-cell>
          <table:table-cell table:style-name="ce2"/>
          <table:table-cell table:style-name="ce2" table:formula="of:=[.S9]/[.K9]" office:value-type="float" office:value="0.757476527434181" calcext:value-type="float">
            <text:p>0.75747652743418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2"/>
          <table:table-cell table:style-name="ce2" table:number-columns-repeated="3"/>
        </table:table-row>
        <table:table-row table:style-name="ro1">
          <table:table-cell table:number-columns-repeated="16"/>
          <table:table-cell table:style-name="ce2"/>
          <table:table-cell table:number-columns-repeated="4"/>
        </table:table-row>
        <table:table-row table:style-name="ro1" table:number-rows-repeated="104856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1T23:29:51.106545459</meta:creation-date>
    <dc:date>2026-07-02T03:44:57.874675055</dc:date>
    <meta:editing-duration>PT4H14M38S</meta:editing-duration>
    <meta:editing-cycles>68</meta:editing-cycles>
    <meta:generator>LibreOffice/24.2.7.2$Linux_X86_64 LibreOffice_project/420$Build-2</meta:generator>
    <meta:document-statistic meta:table-count="1" meta:cell-count="7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588cm" svg:height="13.6cm" xlink:href=".." xlink:type="simple" chart:class="chart:bar" chart:column-mapping="1 3 0 2" chart:style-name="ch1">
        <chart:title svg:x="12.285cm" svg:y="0.408cm" chart:style-name="ch2">
          <text:p>MPI Puro</text:p>
        </chart:title>
        <chart:legend chart:legend-position="end" svg:x="22.572cm" svg:y="5.754cm" style:legend-expansion="high" chart:style-name="ch3"/>
        <chart:plot-area chart:style-name="ch4" table:cell-range-address="Sheet1.A4:Sheet1.A9 Sheet1.I3:Sheet1.I9 Sheet1.U3:Sheet1.U9 Sheet1.G3:Sheet1.G9 Sheet1.S3:Sheet1.S9" chart:data-source-has-labels="both" svg:x="2.473cm" svg:y="1.459cm" svg:width="17.572cm" svg:height="10.888cm">
          <chart:coordinate-region svg:x="3.094cm" svg:y="1.658cm" svg:width="16.223cm" svg:height="10.042cm"/>
          <chart:axis chart:dimension="x" chart:name="primary-x" chart:style-name="ch5" chartooo:axis-type="auto">
            <chartooo:date-scale/>
            <chart:title svg:x="10.461cm" svg:y="12.619cm" chart:style-name="ch6">
              <text:p>Processos</text:p>
            </chart:title>
            <chart:categories table:cell-range-address="Sheet1.A4:Sheet1.A9"/>
          </chart:axis>
          <chart:axis chart:dimension="y" chart:name="primary-y" chart:style-name="ch7">
            <chart:title svg:x="0.451cm" svg:y="6.623cm" chart:style-name="ch6">
              <text:p>Speed-up</text:p>
            </chart:title>
            <chart:grid chart:style-name="ch8" chart:class="major"/>
          </chart:axis>
          <chart:axis chart:dimension="y" chart:name="secondary-y" chart:style-name="ch9">
            <chart:title svg:x="20.576cm" svg:y="6.623cm" chart:style-name="ch6">
              <text:p>Eficiência</text:p>
            </chart:title>
          </chart:axis>
          <chart:series chart:attached-axis="secondary-y" chart:style-name="ch10" chart:values-cell-range-address="Sheet1.I4:Sheet1.I9" chart:label-cell-address="Sheet1.I3:Sheet1.I3" chart:class="chart:bar">
            <chart:data-point chart:repeated="6"/>
          </chart:series>
          <chart:series chart:attached-axis="secondary-y" chart:style-name="ch11" chart:values-cell-range-address="Sheet1.U4:Sheet1.U9" chart:label-cell-address="Sheet1.U3:Sheet1.U3" chart:class="chart:bar">
            <chart:data-point chart:repeated="6"/>
          </chart:series>
          <chart:series chart:attached-axis="primary-y" chart:style-name="ch12" chart:values-cell-range-address="Sheet1.G4:Sheet1.G9" chart:label-cell-address="Sheet1.G3:Sheet1.G3" chart:class="chart:line">
            <chart:data-point chart:repeated="6"/>
          </chart:series>
          <chart:series chart:attached-axis="primary-y" chart:style-name="ch13" chart:values-cell-range-address="Sheet1.S4:Sheet1.S9" chart:label-cell-address="Sheet1.S3:Sheet1.S3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(Forte)</text:p>
                <draw:g>
                  <svg:desc>Sheet1.I3:Sheet1.I3</svg:desc>
                </draw:g>
              </table:table-cell>
              <table:table-cell office:value-type="string">
                <text:p>Eficiência (Fraca)</text:p>
                <draw:g>
                  <svg:desc>Sheet1.U3:Sheet1.U3</svg:desc>
                </draw:g>
              </table:table-cell>
              <table:table-cell office:value-type="string">
                <text:p>Speed-up (Forte)</text:p>
                <draw:g>
                  <svg:desc>Sheet1.G3:Sheet1.G3</svg:desc>
                </draw:g>
              </table:table-cell>
              <table:table-cell office:value-type="string">
                <text:p>Speed-up (Fraca)</text:p>
                <draw:g>
                  <svg:desc>Sheet1.S3:Sheet1.S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1">
                <text:p>1</text:p>
                <draw:g>
                  <svg:desc>Sheet1.I4:Sheet1.I9</svg:desc>
                </draw:g>
              </table:table-cell>
              <table:table-cell office:value-type="float" office:value="1">
                <text:p>1</text:p>
                <draw:g>
                  <svg:desc>Sheet1.U4:Sheet1.U9</svg:desc>
                </draw:g>
              </table:table-cell>
              <table:table-cell office:value-type="float" office:value="1">
                <text:p>1</text:p>
                <draw:g>
                  <svg:desc>Sheet1.G4:Sheet1.G9</svg:desc>
                </draw:g>
              </table:table-cell>
              <table:table-cell office:value-type="float" office:value="1">
                <text:p>1</text:p>
                <draw:g>
                  <svg:desc>Sheet1.S4:Sheet1.S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43715802368947">
                <text:p>0.743715802368947</text:p>
              </table:table-cell>
              <table:table-cell office:value-type="float" office:value="0.768755908205881">
                <text:p>0.768755908205881</text:p>
              </table:table-cell>
              <table:table-cell office:value-type="float" office:value="2.97486320947579">
                <text:p>2.97486320947579</text:p>
              </table:table-cell>
              <table:table-cell office:value-type="float" office:value="3.07502363282352">
                <text:p>3.075023632823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64600365167022">
                <text:p>0.864600365167022</text:p>
              </table:table-cell>
              <table:table-cell office:value-type="float" office:value="0.903359881832918">
                <text:p>0.903359881832918</text:p>
              </table:table-cell>
              <table:table-cell office:value-type="float" office:value="6.91680292133618">
                <text:p>6.91680292133618</text:p>
              </table:table-cell>
              <table:table-cell office:value-type="float" office:value="7.22687905466334">
                <text:p>7.226879054663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9607004890188">
                <text:p>0.89607004890188</text:p>
              </table:table-cell>
              <table:table-cell office:value-type="float" office:value="0.965902375165998">
                <text:p>0.965902375165998</text:p>
              </table:table-cell>
              <table:table-cell office:value-type="float" office:value="14.3371207824301">
                <text:p>14.3371207824301</text:p>
              </table:table-cell>
              <table:table-cell office:value-type="float" office:value="15.454438002656">
                <text:p>15.4544380026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77207105694823">
                <text:p>0.877207105694823</text:p>
              </table:table-cell>
              <table:table-cell office:value-type="float" office:value="0.94839207278004">
                <text:p>0.94839207278004</text:p>
              </table:table-cell>
              <table:table-cell office:value-type="float" office:value="28.0706273822343">
                <text:p>28.0706273822343</text:p>
              </table:table-cell>
              <table:table-cell office:value-type="float" office:value="30.3485463289613">
                <text:p>30.348546328961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89295225994841">
                <text:p>0.689295225994841</text:p>
              </table:table-cell>
              <table:table-cell office:value-type="float" office:value="0.757476527434181">
                <text:p>0.757476527434181</text:p>
              </table:table-cell>
              <table:table-cell office:value-type="float" office:value="44.1148944636698">
                <text:p>44.1148944636698</text:p>
              </table:table-cell>
              <table:table-cell office:value-type="float" office:value="48.4784977557876">
                <text:p>48.4784977557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